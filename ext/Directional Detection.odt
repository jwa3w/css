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rectional Detection Feature</text:p>
      <text:p text:style-name="P1"/>
      <text:p text:style-name="P3">Directional detection is a feature to help detect which player is playing. </text:p>
      <text:p text:style-name="P3"/>
      <text:p text:style-name="P2">Fast Hand:</text:p>
      <text:p text:style-name="P3"/>
      <text:p text:style-name="P3">When Player A picks up a card, a count down begins before moving to the next player if Player A do not discard. This “think time” for the player is set per the user in the app. However, if Player A discards, the system will automatically move to the next player without a countdown. </text:p>
      <text:p text:style-name="P3"/>
      <text:p text:style-name="P3">Because there are impatient players who can read Player A when Player A is done, the Player A group leds remain on until the countdown wait time is over. But because Player B wants to pick up a card, the camera can detect the next player going into the view area. Doing so, allows the system to turn off Player A led group lights and turn on Player B group lights. </text:p>
      <text:p text:style-name="P3"/>
      <text:p text:style-name="P3">If Player B discards, and the system did not have enough time to detect the directional detection switch of player group lights, then the system goes to Player C (only if a discard by Player B).<text:line-break/><text:line-break/><text:line-break/><text:span text:style-name="T1">Error Detection Due to Fast Hand:</text:span></text:p>
      <text:p text:style-name="P3">It is possible that the Player B was going into the view area but Player A decided to discard. So, no weight change by Player B hand but the system sees Player A going into frame and a weight change (gain). Now it is Player B turn (leds on). If Player B does place a card down or picks up, the only way for Player A to play is if Player B picks back up the card from the discard pile or places back the card Player B picked up from the pick-up pile. </text:p>
      <text:p text:style-name="P3"/>
      <text:p text:style-name="P3"><text:span text:style-name="T1">Error Detection Wrong Player:</text:span><text:line-break/>If Player Z goes into frame while it is still Player As turn and the system knows Player Z is not supposed to play but rather Player B, the system ignores the play and continues to count down until Player Bs leds are on. </text:p>
      <text:p text:style-name="P3"/>
      <text:p text:style-name="P3">The system may alert on the App that wrong move – illegal play and let players know whose turn it is. Can also do Audio Call “Joshua, it is not your turn, it is Jeremys turn. Pick up your card from the discard pile.” Or “..... place card back randomly in the pick up deck”</text:p>
      <text:p text:style-name="P3"/>
      <text:p text:style-name="P3"><text:span text:style-name="T1">UNO!</text:span><text:line-break/>If it is Player A's turn and Player B did not pick up yet or put down a card, and Player A picks up 2 more cards, proceed as normal to Player B. <text:line-break/>However, if it is now Player Bs turn and Player B did not go yet but Player A is picking up 2 cards, Player B remains unchanged and can play while Player As two extra card pick up is ignored by the system. <text:line-break/><text:line-break/>What happened is that Player B called out Player A for not saying UNO! And is penalized to pick up two cards.<text:line-break/><text:line-break/><text:span text:style-name="T1">Note:</text:span></text:p>
      <text:p text:style-name="P3">There may be other things as 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 R</meta:initial-creator>
    <meta:creation-date>2025-08-03T16:40:59.23</meta:creation-date>
    <meta:generator>OpenOffice/4.1.15$Win32 OpenOffice.org_project/4115m2$Build-9813</meta:generator>
    <dc:date>2025-08-03T16:59:03.57</dc:date>
    <dc:creator>J R</dc:creator>
    <meta:editing-duration>PT18M7S</meta:editing-duration>
    <meta:editing-cycles>3</meta:editing-cycles>
    <meta:document-statistic meta:table-count="0" meta:image-count="0" meta:object-count="0" meta:page-count="1" meta:paragraph-count="11" meta:word-count="488" meta:character-count="2474"/>
  </office:meta>
</office:document-meta>
</file>