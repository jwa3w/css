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ue Montreal" svg:font-family="'Neue Montreal', neue-montreal-fallback, Arial, sans-serif, 'Apple Color Emoji', 'Segoe UI Emoji', 'Segoe UI Symbol', 'Noto Color Emoj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181818" style:font-name="Neue Montreal" fo:font-size="10.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O Whose Turn Stand-Alone Game Play<text:line-break/><text:line-break/>Minimum of 3 players</text:p>
      <text:p text:style-name="Standard"/>
      <text:p text:style-name="Standard">Turn on<text:line-break/>Turn on Audio if want that on. <text:line-break/><text:line-break/><text:line-break/><text:line-break/>Tap side button to turn on player. </text:p>
      <text:p text:style-name="Standard">Hold side button to record – say something when it begins to blink. Up to 5 seconds</text:p>
      <text:list xml:id="list9109482158261209810" text:style-name="L1">
        <text:list-item>
          <text:p text:style-name="P1">can rewrite over recording by doing the long press and record again.</text:p>
        </text:list-item>
        <text:list-item>
          <text:p text:style-name="P1"><text:s/>only listens to 1 player at a time</text:p>
        </text:list-item>
      </text:list>
      <text:p text:style-name="Standard">2 Tap</text:p>
      <text:p text:style-name="Standard">3 Tap</text:p>
      <text:p text:style-name="Standard">4 Tap <text:line-break/><text:span text:style-name="T1">The 2, 3 tap deals with moving the player group led lights. The 4 tap removes player group leds.</text:span> </text:p>
      <text:p text:style-name="Standard"/>
      <text:p text:style-name="Standard">Press plate when all players are ready</text:p>
      <text:p text:style-name="Standard">press side button for who is dealer</text:p>
      <text:p text:style-name="Standard">pass out cards, then place deck by cam shaft</text:p>
      <text:p text:style-name="Standard">wait for stop blinking – then place a card down from the deck</text:p>
      <text:p text:style-name="Standard"/>
      <text:p text:style-name="Standard">Game:<text:line-break/>One press side button = reverse</text:p>
      <text:p text:style-name="Standard">Double press side button = skip player</text:p>
      <text:p text:style-name="Standard">long press = move to player oppose direction of tracer</text:p>
      <text:p text:style-name="Standard"/>
      <text:p text:style-name="Standard"><text:line-break/>If all deck cards are out, remove all cards, then place the top card down on the plate. (Only 1 card on plate). You have up to 10 seconds to place the one card on the plate or the new round begins. Reshuffle and place on plate by the cam shaft as a deck pick up.<text:line-break/><text:line-break/>If game is over, remove all cards from plate. The next dealer lights will blink. <text:line-break/><text:line-break/><text:line-break/><text:span text:style-name="T1">If you want to restart a complete new game (new players etc), turn power off and then power 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ue Montreal" svg:font-family="'Neue Montreal', neue-montreal-fallback, Arial, sans-serif, 'Apple Color Emoji', 'Segoe UI Emoji', 'Segoe UI Symbol', 'Noto Color Emoj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R</meta:initial-creator>
    <meta:creation-date>2024-11-03T08:31:14.27</meta:creation-date>
    <dc:date>2025-08-04T19:37:23.13</dc:date>
    <dc:creator>J R</dc:creator>
    <meta:editing-duration>PT12M45S</meta:editing-duration>
    <meta:editing-cycles>11</meta:editing-cycles>
    <meta:generator>OpenOffice/4.1.15$Win32 OpenOffice.org_project/4115m2$Build-9813</meta:generator>
    <meta:document-statistic meta:table-count="0" meta:image-count="0" meta:object-count="0" meta:page-count="1" meta:paragraph-count="16" meta:word-count="240" meta:character-count="1190"/>
  </office:meta>
</office:document-meta>
</file>