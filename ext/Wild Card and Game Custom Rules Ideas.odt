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in" fo:margin-bottom="0.111in" fo:line-height="107%" fo:text-align="start" style:justify-single-word="false" style:text-autospace="none" style:vertical-align="auto" style:writing-mode="lr-tb">
        <style:tab-stops/>
      </style:paragraph-properties>
      <style:text-properties style:font-name="Calibri" fo:font-size="11pt" fo:language="en" fo:country="US" style:letter-kerning="true" style:font-name-asian="Calibri" style:font-size-asian="11pt" style:language-asian="en" style:country-asian="US" style:font-name-complex="Times New Roman" style:font-size-complex="11pt" style:language-complex="ar" style:country-complex="SA"/>
    </style:style>
    <style:style style:name="P4" style:family="paragraph" style:parent-style-name="Standard">
      <style:paragraph-properties fo:margin-top="0in" fo:margin-bottom="0.111in" fo:line-height="107%" fo:text-align="start" style:justify-single-word="false" style:text-autospace="none" style:vertical-align="auto" style:writing-mode="lr-tb"/>
      <style:text-properties style:font-name="Calibri" fo:font-size="11pt" fo:language="en" fo:country="US" style:letter-kerning="true" style:font-name-asian="Calibri" style:font-size-asian="11pt" style:language-asian="en" style:country-asian="US" style:font-name-complex="Times New Roman" style:font-size-complex="11pt" style:language-complex="ar" style:country-complex="SA"/>
    </style:style>
    <style:style style:name="P5" style:family="paragraph" style:parent-style-name="Standard">
      <style:paragraph-properties fo:margin-top="0in" fo:margin-bottom="0.111in" fo:line-height="107%" fo:text-align="start" style:justify-single-word="false" style:text-autospace="none" style:vertical-align="auto" style:writing-mode="lr-tb"/>
      <style:text-properties style:font-name="Calibri" fo:font-size="11pt" fo:language="en" fo:country="US" fo:font-weight="normal" style:letter-kerning="true" style:font-name-asian="Calibri" style:font-size-asian="11pt" style:language-asian="en" style:country-asian="US" style:font-weight-asian="normal" style:font-name-complex="Times New Roman" style:font-size-complex="11pt" style:language-complex="ar" style:country-complex="SA" style:font-weight-complex="normal"/>
    </style:style>
    <style:style style:name="P6" style:family="paragraph" style:parent-style-name="Standard">
      <style:paragraph-properties fo:margin-top="0in" fo:margin-bottom="0.111in" fo:line-height="107%" fo:text-align="start" style:justify-single-word="false" style:text-autospace="none" style:vertical-align="auto" style:writing-mode="lr-tb"/>
    </style:style>
    <style:style style:name="T1" style:family="text">
      <style:text-properties fo:font-weight="bold" style:font-weight-asian="bold" style:font-weight-complex="bold"/>
    </style:style>
    <style:style style:name="T2" style:family="text">
      <style:text-properties style:font-name="Calibri" fo:font-size="11pt" fo:language="en" fo:country="US" fo:font-weight="bold" style:letter-kerning="true" style:font-name-asian="Calibri" style:font-size-asian="11pt" style:language-asian="en" style:country-asian="US" style:font-weight-asian="bold" style:font-name-complex="Times New Roman" style:font-size-complex="11pt" style:language-complex="ar" style:country-complex="SA" style:font-weight-complex="bold"/>
    </style:style>
    <style:style style:name="T3" style:family="text">
      <style:text-properties style:font-name="Calibri" fo:font-size="11pt" fo:language="en" fo:country="US" style:letter-kerning="true" style:font-name-asian="Calibri" style:font-size-asian="11pt" style:language-asian="en" style:country-asian="US" style:font-name-complex="Times New Roman" style:font-size-complex="11pt" style:language-complex="ar" style:country-complex="SA"/>
    </style:style>
    <style:style style:name="T4" style:family="text">
      <style:text-properties style:font-name="Calibri" fo:font-size="11pt" fo:language="en" fo:country="US" fo:font-weight="normal" style:letter-kerning="true" style:font-name-asian="Calibri" style:font-size-asian="11pt" style:language-asian="en" style:country-asian="US" style:font-weight-asian="normal" style:font-name-complex="Times New Roman" style:font-size-complex="11pt" style:language-complex="ar" style:country-complex="SA"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ld Card Rule Ideas (AI Generated)</text:p>
      <text:p text:style-name="Standard"><text:line-break/><text:span text:style-name="T2">Color Swap</text:span><text:span text:style-name="T3"> - Everyone must exchange their cards with the player on their right, but they must keep the same number of cards. The color is then chosen by the player who played the card.</text:span></text:p>
      <text:p text:style-name="Standard"><text:span text:style-name="T3"/></text:p>
      <text:p text:style-name="P3"><text:span text:style-name="T1">Reverse Draw</text:span> - Play reverses direction, and the next player must draw 2 cards before their turn. The color is chosen by the player who played the Wild card.</text:p>
      <text:p text:style-name="P3"><text:span text:style-name="T1">Double Play</text:span> - The player who played this card gets to play another card immediately after choosing the color. If they can't play another card, play passes to the next player.</text:p>
      <text:p text:style-name="P3"><text:span text:style-name="T1">Skip Two</text:span> - Skip the next two players. The color of the card is chosen by the player who played this Wild card.</text:p>
      <text:p text:style-name="P3"><text:span text:style-name="T1">Seven Up</text:span> - Every player must give one card of their choice to the player who has the highest number card in their hand (7 being the highest). If multiple players have a 7, look for the next highest number. The color is chosen by the player who played this card.</text:p>
      <text:p text:style-name="P3"><text:span text:style-name="T1">Wild Whisper</text:span> - The player who played this card can whisper a rule to the next player, who must follow it on their turn. The color is then chosen by the player who played the card.</text:p>
      <text:p text:style-name="P3"><text:span text:style-name="T1">Trade Hands</text:span> - Choose any one player to trade hands with. After trading, choose the color for the next play.</text:p>
      <text:p text:style-name="P3"><text:span text:style-name="T1">Draw Until Match</text:span> - The next player draws cards until they find one that matches the color chosen by the player who laid down this Wild card. </text:p>
      <text:p text:style-name="P3"><text:span text:style-name="T1">Silent Turn</text:span> - The next player must play their turn without speaking or making any noise. If they break silence, they draw 2 cards. The color is chosen by the player who played the Wild card.</text:p>
      <text:p text:style-name="P3"><text:span text:style-name="T1">Wild Veto</text:span> - This card allows the player to veto the last played card if they believe it was played incorrectly or against a house rule. If vetoed, play reverts to before that card was played, and the vetoing player chooses the new color. If no veto is needed, it acts like a regular Wild card where the player simply chooses the color.</text:p>
      <text:p text:style-name="P4"><text:span text:style-name="T1">Mirror Match</text:span> - The next player must play a card of the same number or action (like Draw Two, Skip, etc.) as the last card played before this Wild card, or draw until they can. The color is chosen by the player who played the Wild.</text:p>
      <text:p text:style-name="P4"><text:span text:style-name="T1">Challenge Mode</text:span> - Any player can challenge the person who played this Wild card to name three countries starting with the letter of the color chosen (e.g., 'R' for Red). If they fail, they draw 2 cards; if they succeed, the challenger draws 2.</text:p>
      <text:p text:style-name="P4"><text:span text:style-name="T1">Reverse Swap</text:span> - Direction reverses, and each player swaps one card of their choice with the player opposite them (if 4+ players) or beside them (if fewer players). Then, the color for play is chosen.</text:p>
      <text:p text:style-name="P4"><text:span text:style-name="T1">Wild Peek</text:span> - The player who plays this card can look at the hand of any player of their choice and then choose the color for play.</text:p>
      <text:p text:style-name="P4"><text:span text:style-name="T1">Freeze</text:span> - The player to the left of the one who played this card is frozen for their next turn. They can't play or draw; the turn goes to the player after them. The color is chosen by the player who played the Wild card.</text:p>
      <text:p text:style-name="P4"><text:span text:style-name="T1">Wild Bluff</text:span> - The player can lie about what color they are choosing. If caught lying by another player before the next card is played, the liar draws 4 cards. If not caught, the game continues with the chosen color.</text:p>
      <text:p text:style-name="P4"><text:span text:style-name="T1">Last Card Ban</text:span> - The player who played this card can ban one specific card (e.g., "No more playing 7s") for the rest of the game or until another Wild card with this rule is played. Then they choose the new color.</text:p>
      <text:p text:style-name="P4"><text:soft-page-break/><text:span text:style-name="T1">Wild Memory</text:span> - The player must remember and state the color of the card played three turns ago. If correct, they choose the new color; if wrong, they draw 2 cards and the next player decides the color.</text:p>
      <text:p text:style-name="P4"><text:span text:style-name="T1">Double Down</text:span> - The effect of the last action card (like Draw Two or Skip) is doubled for the next player. If no action card was last played, it acts as a regular Wild where the player chooses the color.</text:p>
      <text:p text:style-name="P4"><text:span text:style-name="T1">Wild Whisper Plus</text:span> - Similar to Wild Whisper, but the whispered rule applies to all players until another Wild card is played. The player who played this card chooses the color.</text:p>
      <text:p text:style-name="Standard"><text:line-break/><text:span text:style-name="T2">Wild Auction</text:span><text:span text:style-name="T4"> - Players can bid cards to play next. The highest bidder (who gives up the most cards) gets to play immediately after, choosing the color. All cards bid are placed at the bottom of the draw pile.</text:span></text:p>
      <text:p text:style-name="P1"><text:span text:style-name="T3"/></text:p>
      <text:p text:style-name="P5"><text:span text:style-name="T1">Backward Play </text:span>- For the next three turns, players must play cards in reverse order (e.g., if you have 5, 3, and 2, you must play 2 first). The color is chosen by the player who played this card.</text:p>
      <text:p text:style-name="P5"><text:span text:style-name="T1">Wild Mirage -</text:span> The card looks like one color but is actually another. The player who plays this card declares a color, but it's secretly the opposite color (e.g., say "Blue" but it's really "Red"). The first player to play must match the secret color or draw.</text:p>
      <text:p text:style-name="P5"><text:span text:style-name="T1">Wild Tax</text:span> - Each player must give one card to the player who played this Wild card. If they can't, they draw one instead. The color is then chosen by the tax collector.</text:p>
      <text:p text:style-name="P5"><text:span text:style-name="T1">Reverse Draw Two</text:span> - Play reverses, and the player who would have been next must draw 2 cards. The color is chosen by the player who played the Wild card.</text:p>
      <text:p text:style-name="P5"><text:span text:style-name="T1">Wild Dilemma</text:span> - The player must choose: either draw 4 cards or skip their next two turns. After choosing, they select the color for play.</text:p>
      <text:p text:style-name="P5"><text:span text:style-name="T1">Blind Choice</text:span> - The player must choose the next color without looking at the cards in their hand. If they can't play, they draw until they can match the chosen color.</text:p>
      <text:p text:style-name="P5"><text:span text:style-name="T1">Wild Reroll </text:span>- Any action card played before this one (like Skip, Reverse, Draw Two) is negated, and the turn reverts to before that action. The player then chooses the color for play.</text:p>
      <text:p text:style-name="P5"><text:span text:style-name="T1">Wild Spy</text:span> - The player can secretly look at one card from the draw pile before choosing the color. They must then put the card back on top or at the bottom of the pile.</text:p>
      <text:p text:style-name="P5"><text:span text:style-name="T1">Echo Rule</text:span> - The next player must play a card of the same action or number as the one played immediately before this Wild card, or they draw until they can. After, the color for play is chosen by the player who put down the Wild card.</text:p>
      <text:p text:style-name="Standard"><text:line-break/><text:line-break/>Game Rule Ideas</text:p>
      <text:p text:style-name="Standard"/>
      <text:p text:style-name="Standard">Random “Attack”. The device will randomly have a player pick up a certain amount of cards, then their play is over. </text:p>
      <text:p text:style-name="Standard"/>
      <text:p text:style-name="Standard">SPEED play – The gave intensifies as the game goes on. Sometimes it slows back down. Each player has a certain amount of time to play their hand. <text:line-break/><text:line-break/>AI Generated Ideas Game Rule Ideas:<text:line-break/><text:soft-page-break/><text:line-break/><text:span text:style-name="T2">UNO Time Bomb</text:span><text:span text:style-name="T3"> - Set a timer for each player's turn (e.g., 10 seconds). If a player can't play a card before the time runs out, they must draw 2 cards. This adds a speed element to the game.</text:span></text:p>
      <text:p text:style-name="Standard"><text:span text:style-name="T3"/></text:p>
      <text:p text:style-name="P4"><text:span text:style-name="T1">UNO Reverse Challenge</text:span> - When a Reverse card is played, the direction changes, but the new "last" player must immediately play another card or draw 2. This makes the game more strategic by forcing quick decisions.</text:p>
      <text:p text:style-name="P4"><text:span text:style-name="T1">UNO Countdown</text:span> - Start with a set number of rounds (e.g., 10). Each round, the player who ends the round by playing the last card must draw cards equal to the number of rounds remaining. This adds pressure as the game progresses.</text:p>
      <text:p text:style-name="P4"><text:span text:style-name="T1">UNO Marathon</text:span> - Instead of playing to get rid of cards, players aim to collect specific cards. Each player gets a goal card at the start (e.g., collect 3 reds). The first to meet their goal wins, but players must still play by UNO rules, picking up cards if they can't play.</text:p>
      <text:p text:style-name="P4"><text:span text:style-name="T1">UNO Points Race</text:span> - Assign point values to cards (e.g., numbers = face value, Skip/Draw Two = 20, Reverse = 10, Wild/Wild Draw Four = 50). Play until someone reaches a predetermined score, with the twist that players must shout "UNO" if they have one card left or draw 4.</text:p>
      <text:p text:style-name="P4"><text:span text:style-name="T1">UNO Chain Reaction</text:span> - When an action card (Skip, Reverse, Draw Two) is played, the effect cascades. For example, playing a Skip makes the next player skip, and they must then play another Skip if they have one, or draw 2. This can create long chains of actions.</text:p>
      <text:p text:style-name="P4"><text:span text:style-name="T1">UNO Blind Deal</text:span> - Deal cards face down to each player. Players can only look at one card at a time and must decide whether to play it or look at another. If they can't play after looking at all their cards, they draw one from the deck.</text:p>
      <text:p text:style-name="P4"><text:span text:style-name="T1">UNO Double Draw</text:span> - When you draw a card because you can't play, you must draw two cards instead of one. This increases the penalty for not having a playable card, making each turn more critical.</text:p>
      <text:p text:style-name="P4"><text:span text:style-name="T1">UNO Last Card Frenzy</text:span> - When a player has only one card left, everyone else must draw one card and then play resumes. This adds a strategic element where players might want to delay going down to one card at inopportune moments.</text:p>
      <text:p text:style-name="P4"><text:span text:style-name="T1">UNO Silent Night</text:span> - Players must play their turn without speaking or making noise. If a player breaks this rule, they must draw 2 cards. This can be especially challenging during complex plays or when needing to clarify rules.</text:p>
      <text:p text:style-name="P4"><text:span text:style-name="T1">UNO Color Lock</text:span> - Once a color is played three times in a row, that color is "locked" until a Wild card changes it or another color is played three times. This encourages strategic color management.</text:p>
      <text:p text:style-name="P4"><text:span text:style-name="T1">UNO Number Knockout</text:span> - Players can "knock out" a number for one round by playing it; that number can't be played until the next round. If you play the last of a number, you choose a new number to knock out for the next round.</text:p>
      <text:p text:style-name="P4"><text:span text:style-name="T1">UNO Speed Uno</text:span> - Set a timer for the entire game (e.g., 5 minutes). The player with the fewest cards at the end of the timer wins. This version emphasizes speed over strategy.</text:p>
      <text:p text:style-name="P4"><text:span text:style-name="T1">UNO Action Card Duel</text:span> - When an action card (Skip, Reverse, Draw Two) is played, the affected player can challenge it with their own action card of the same type. If they succeed, the action is negated; if not, they take double the penalty.</text:p>
      <text:p text:style-name="P4"><text:span text:style-name="T1">UNO Stacking Challenge</text:span> - Players can stack actions. If you play a Draw Two on top of another Draw Two, the <text:soft-page-break/>next player draws four. This can go up to four stacked cards of the same type before the pile must be cleared.</text:p>
      <text:p text:style-name="P4"><text:span text:style-name="T1">UNO Wild Round</text:span> - At the start of each round, draw one card. If it's a Wild, the entire round follows special rules where only numbers can be played, and actions are doubled in effect. The round ends when someone goes out or when no more moves are possible.</text:p>
      <text:p text:style-name="P4"><text:span text:style-name="T1">UNO Penalty Points</text:span> - Instead of drawing cards, players take penalty points for each card they can't play at the end of a round. The game continues for multiple rounds, and the player with the lowest score wins.</text:p>
      <text:p text:style-name="P4"><text:span text:style-name="T1">UNO Trade Day</text:span> - Once per game, each player can force a trade with another player by playing a card. The player must choose one card from the opponent's hand to swap with one of their own, adding a layer of mind games.</text:p>
      <text:p text:style-name="P4"><text:span text:style-name="T1">UNO Blind Play</text:span> - Players must play cards without looking at their hand. Each turn, they feel for a card to play. If they can't play, they must draw one card and then continue blindly. This adds an element of luck and feel.</text:p>
      <text:p text:style-name="P4"><text:span text:style-name="T1">UNO Chain Reaction with a Twist</text:span> - Similar to the chain reaction but with an added rule: if three cards of the same action type (e.g., three Skips) are played consecutively, the player who initiated the chain must draw 3 cards, ending the chain.</text:p>
      <text:p text:style-name="P4"/>
      <text:p text:style-name="P6"><text:span text:style-name="T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text:style-name="RTF_5f_Num_20_2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R</meta:initial-creator>
    <meta:creation-date>2025-01-02T13:56:18.25</meta:creation-date>
    <dc:date>2025-01-02T14:28:15.16</dc:date>
    <dc:creator>J R</dc:creator>
    <meta:editing-duration>PT31M58S</meta:editing-duration>
    <meta:editing-cycles>5</meta:editing-cycles>
    <meta:generator>OpenOffice/4.1.15$Win32 OpenOffice.org_project/4115m2$Build-9813</meta:generator>
    <meta:document-statistic meta:table-count="0" meta:image-count="0" meta:object-count="0" meta:page-count="4" meta:paragraph-count="53" meta:word-count="2021" meta:character-count="10604"/>
  </office:meta>
</office:document-meta>
</file>