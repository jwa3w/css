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deos</text:p>
      <text:p text:style-name="Standard"/>
      <text:p text:style-name="Standard">Stand Alone Versions:</text:p>
      <text:p text:style-name="Standard">Game without camera: <text:a xlink:type="simple" xlink:href="https://youtu.be/WY5UqNMtyco" text:style-name="Internet_20_link" text:visited-style-name="Visited_20_Internet_20_Link">https://youtu.be/WY5UqNMtyco</text:a></text:p>
      <text:p text:style-name="Standard">Game with Camera: <text:a xlink:type="simple" xlink:href="https://www.youtube.com/watch?v=9Aq-nEH3y7Q" text:style-name="Internet_20_link" text:visited-style-name="Visited_20_Internet_20_Link">https://www.youtube.com/watch?v=9Aq-nEH3y7Q</text:a> <text:s text:c="3"/></text:p>
      <text:p text:style-name="Standard"/>
      <text:p text:style-name="Standard">Mobile App Version:</text:p>
      <text:p text:style-name="Standard">Part 1: <text:a xlink:type="simple" xlink:href="https://youtu.be/DFPdZhhQ2Lo" text:style-name="Internet_20_link" text:visited-style-name="Visited_20_Internet_20_Link">https://youtu.be/DFPdZhhQ2Lo</text:a> </text:p>
      <text:p text:style-name="Standard">Part 2: <text:a xlink:type="simple" xlink:href="https://youtu.be/meJfpL51OQY" text:style-name="Internet_20_link" text:visited-style-name="Visited_20_Internet_20_Link">https://youtu.be/meJfpL51OQY</text:a> </text:p>
      <text:p text:style-name="Standard">Part 3: <text:a xlink:type="simple" xlink:href="https://youtu.be/eO3jsMoYebc" text:style-name="Internet_20_link" text:visited-style-name="Visited_20_Internet_20_Link">https://youtu.be/eO3jsMoYebc</text:a> </text:p>
      <text:p text:style-name="Standard"/>
      <text:p text:style-name="Standard"><text:line-break/>The mobile app version will be the primary code (by the software developer) so it basically is the brain of the vast of the whole version. It must make the game as natural game play as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R</meta:initial-creator>
    <meta:creation-date>2025-08-04T20:06:32.49</meta:creation-date>
    <meta:document-statistic meta:table-count="0" meta:image-count="0" meta:object-count="0" meta:page-count="1" meta:paragraph-count="9" meta:word-count="61" meta:character-count="467"/>
    <dc:date>2025-08-04T20:10:52.46</dc:date>
    <dc:creator>J R</dc:creator>
    <meta:editing-duration>PT4M22S</meta:editing-duration>
    <meta:editing-cycles>1</meta:editing-cycles>
    <meta:generator>OpenOffice/4.1.15$Win32 OpenOffice.org_project/4115m2$Build-9813</meta:generator>
  </office:meta>
</office:document-meta>
</file>